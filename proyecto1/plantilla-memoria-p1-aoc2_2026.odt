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1000003AF299691BA.png" manifest:media-type="image/png"/>
  <manifest:file-entry manifest:full-path="Pictures/10000001000007520000039EFA1E2F21.png" manifest:media-type="image/png"/>
  <manifest:file-entry manifest:full-path="Pictures/1000000100000781000003AF6DA2C9F4.png" manifest:media-type="image/png"/>
  <manifest:file-entry manifest:full-path="Pictures/1000000100000781000003AFADBB3C52.png" manifest:media-type="image/png"/>
  <manifest:file-entry manifest:full-path="Pictures/1000000100000781000003AFE4E22836.png" manifest:media-type="image/png"/>
  <manifest:file-entry manifest:full-path="Pictures/1000000100000781000003AF96067833.png" manifest:media-type="image/png"/>
  <manifest:file-entry manifest:full-path="Pictures/100000010000077E000003B095C880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ymbols" svg:font-family="'Noto Sans Symbols'" style:font-family-generic="system" style:font-pitch="variable"/>
    <style:font-face style:name="OpenSymbol" svg:font-family="OpenSymbol" style:font-charset="x-symbol"/>
  </office:font-face-decls>
  <office:automatic-styles>
    <style:style style:name="P1" style:family="paragraph" style:parent-style-name="Heading_20_1" style:master-page-name="Standard">
      <style:paragraph-properties style:page-number="1"/>
      <style:text-properties fo:color="#366091" loext:opacity="100%" style:font-name="Cambria" fo:font-size="22pt" fo:font-weight="normal" style:font-name-asian="Cambria2" style:font-size-asian="22pt" style:font-weight-asian="normal" style:font-name-complex="Cambria2" style:font-size-complex="22pt"/>
    </style:style>
    <style:style style:name="P2" style:family="paragraph" style:parent-style-name="Standard">
      <style:text-properties officeooo:rsid="001d75a4" officeooo:paragraph-rsid="001d75a4"/>
    </style:style>
    <style:style style:name="P3" style:family="paragraph" style:parent-style-name="Standard">
      <style:text-properties style:font-weight-complex="bold"/>
    </style:style>
    <style:style style:name="P4" style:family="paragraph" style:parent-style-name="Standard">
      <style:text-properties fo:font-weight="bold" style:font-weight-asian="bold"/>
    </style:style>
    <style:style style:name="P5" style:family="paragraph" style:parent-style-name="Standard" style:list-style-name="WWNum1">
      <style:paragraph-properties fo:margin-top="0cm" fo:margin-bottom="0cm" style:contextual-spacing="false" fo:padding="0cm" fo:border="none" style:shadow="none" style:join-border="false"/>
    </style:style>
    <style:style style:name="P6" style:family="paragraph" style:parent-style-name="Standard" style:list-style-name="WWNum1">
      <style:paragraph-properties fo:margin-top="0cm" fo:margin-bottom="0cm" style:contextual-spacing="false" fo:padding="0cm" fo:border="none" style:shadow="none" style:join-border="false"/>
      <style:text-properties fo:color="#000000" loext:opacity="100%" style:font-name="Consolas" fo:font-size="9pt" style:font-name-asian="Consolas1" style:font-size-asian="9pt" style:font-name-complex="Consolas1" style:font-size-complex="9pt"/>
    </style:style>
    <style:style style:name="P7" style:family="paragraph" style:parent-style-name="Standard">
      <style:paragraph-properties fo:margin-top="0cm" fo:margin-bottom="0cm" style:contextual-spacing="false" fo:padding="0cm" fo:border="none" style:shadow="none" style:join-border="false"/>
      <style:text-properties fo:color="#000000" loext:opacity="100%" style:font-name="Consolas" fo:font-size="12pt" style:font-name-asian="Consolas1" style:font-size-asian="12pt" style:font-name-complex="Consolas1" style:font-size-complex="12pt"/>
    </style:style>
    <style:style style:name="P8" style:family="paragraph" style:parent-style-name="Standard" style:list-style-name="WWNum1">
      <style:paragraph-properties fo:padding="0cm" fo:border="none" style:shadow="none" style:join-border="false"/>
      <style:text-properties fo:color="#000000" loext:opacity="100%" fo:font-size="10pt" style:font-size-asian="10pt" style:font-size-complex="10pt"/>
    </style:style>
    <style:style style:name="P9" style:family="paragraph" style:parent-style-name="Standard" style:list-style-name="WWNum1">
      <style:paragraph-properties fo:padding="0cm" fo:border="none" style:shadow="none" style:join-border="false"/>
      <style:text-properties fo:color="#000000" loext:opacity="100%" fo:font-size="10pt" officeooo:paragraph-rsid="0028718c" style:font-size-asian="10pt" style:font-size-complex="10pt"/>
    </style:style>
    <style:style style:name="P10" style:family="paragraph" style:parent-style-name="Standard">
      <style:paragraph-properties fo:padding="0cm" fo:border="none" style:shadow="none" style:join-border="false"/>
      <style:text-properties fo:color="#000000" loext:opacity="100%" fo:font-size="10pt" style:font-size-asian="10pt" style:font-size-complex="10pt"/>
    </style:style>
    <style:style style:name="P11" style:family="paragraph" style:parent-style-name="Text_20_body">
      <style:paragraph-properties fo:padding="0cm" fo:border="none" style:shadow="none" style:join-border="false"/>
      <style:text-properties fo:color="#000000" loext:opacity="100%" fo:font-size="10pt" style:font-size-asian="10pt" style:font-size-complex="10pt"/>
    </style:style>
    <style:style style:name="P12" style:family="paragraph" style:parent-style-name="Text_20_body">
      <style:paragraph-properties fo:margin-top="0cm" fo:margin-bottom="0.353cm" style:contextual-spacing="false" style:join-border="false"/>
      <style:text-properties fo:color="#000000" loext:opacity="100%" fo:font-size="10pt" style:font-size-asian="10pt" style:font-size-complex="10pt"/>
    </style:style>
    <style:style style:name="P13" style:family="paragraph" style:parent-style-name="Standard" style:list-style-name="WWNum2">
      <style:paragraph-properties fo:margin-top="0cm" fo:margin-bottom="0cm" style:contextual-spacing="false" fo:padding="0cm" fo:border="none" style:shadow="none" style:join-border="false"/>
      <style:text-properties fo:color="#000000" loext:opacity="100%"/>
    </style:style>
    <style:style style:name="P14" style:family="paragraph" style:parent-style-name="Standard" style:list-style-name="WWNum2">
      <style:paragraph-properties fo:margin-top="0cm" fo:margin-bottom="0cm" style:contextual-spacing="false" fo:padding="0cm" fo:border="none" style:shadow="none" style:join-border="false"/>
    </style:style>
    <style:style style:name="P15" style:family="paragraph" style:parent-style-name="List_20_Paragraph" style:list-style-name="WWNum2">
      <style:paragraph-properties fo:margin-top="0cm" fo:margin-bottom="0cm" style:contextual-spacing="true" fo:padding="0cm" fo:border="none" style:shadow="none" style:join-border="false"/>
    </style:style>
    <style:style style:name="P16" style:family="paragraph" style:parent-style-name="Standard" style:list-style-name="WWNum2">
      <style:paragraph-properties fo:margin-top="0cm" fo:margin-bottom="0cm" style:contextual-spacing="false" fo:padding="0cm" fo:border="none" style:shadow="none" style:join-border="false"/>
      <style:text-properties fo:color="#000000" loext:opacity="100%" style:font-name="Consolas" fo:font-size="9pt" style:font-name-asian="Consolas1" style:font-size-asian="9pt" style:font-name-complex="Consolas1" style:font-size-complex="9pt"/>
    </style:style>
    <style:style style:name="P17" style:family="paragraph" style:parent-style-name="Standard" style:list-style-name="WWNum2">
      <style:paragraph-properties fo:padding="0cm" fo:border="none" style:shadow="none" style:join-border="false"/>
      <style:text-properties fo:color="#000000" loext:opacity="100%" fo:font-size="10pt" style:font-size-asian="10pt" style:font-size-complex="10pt"/>
    </style:style>
    <style:style style:name="P18" style:family="paragraph" style:parent-style-name="Standard">
      <style:paragraph-properties fo:padding="0cm" fo:border="none" style:shadow="none" style:join-border="false"/>
    </style:style>
    <style:style style:name="P19" style:family="paragraph" style:parent-style-name="Standard">
      <style:text-properties fo:color="#366091" loext:opacity="100%" style:font-name="Cambria" fo:font-size="13pt" style:font-name-asian="Cambria2" style:font-size-asian="13pt" style:font-name-complex="Cambria2" style:font-size-complex="13pt"/>
    </style:style>
    <style:style style:name="P20" style:family="paragraph" style:parent-style-name="Standard" style:list-style-name="WWNum4">
      <style:paragraph-properties fo:margin-top="0cm" fo:margin-bottom="0cm" style:contextual-spacing="false" fo:padding="0cm" fo:border="none" style:shadow="none" style:join-border="false"/>
    </style:style>
    <style:style style:name="P21" style:family="paragraph" style:parent-style-name="Standard" style:list-style-name="WWNum4">
      <style:paragraph-properties fo:margin-top="0cm" fo:margin-bottom="0cm" style:contextual-spacing="false" fo:padding="0cm" fo:border="none" style:shadow="none" style:join-border="false"/>
      <style:text-properties fo:color="#000000" loext:opacity="100%"/>
    </style:style>
    <style:style style:name="P22" style:family="paragraph" style:parent-style-name="Standard" style:list-style-name="WWNum4">
      <style:paragraph-properties fo:padding="0cm" fo:border="none" style:shadow="none" style:join-border="false"/>
    </style:style>
    <style:style style:name="P23" style:family="paragraph" style:parent-style-name="List_20_Paragraph" style:list-style-name="WWNum7">
      <style:text-properties officeooo:rsid="0029755a" officeooo:paragraph-rsid="0029755a"/>
    </style:style>
    <style:style style:name="P24" style:family="paragraph" style:parent-style-name="List_20_Paragraph" style:list-style-name="WWNum7"/>
    <style:style style:name="P25" style:family="paragraph" style:parent-style-name="Standard">
      <style:text-properties officeooo:paragraph-rsid="00271c7c"/>
    </style:style>
    <style:style style:name="P26" style:family="paragraph" style:parent-style-name="Standard" style:list-style-name="WWNum3">
      <style:paragraph-properties fo:margin-top="0cm" fo:margin-bottom="0cm" style:contextual-spacing="false" fo:padding="0cm" fo:border="none" style:shadow="none" style:join-border="false"/>
      <style:text-properties fo:color="#000000" loext:opacity="100%"/>
    </style:style>
    <style:style style:name="P27" style:family="paragraph" style:parent-style-name="Standard">
      <style:paragraph-properties fo:margin-left="1.27cm" fo:margin-top="0cm" fo:margin-bottom="0cm" style:contextual-spacing="false" fo:padding="0cm" fo:border="none" style:shadow="none" style:join-border="false"/>
    </style:style>
    <style:style style:name="P28" style:family="paragraph" style:parent-style-name="List_20_Paragraph" style:list-style-name="WWNum5">
      <style:paragraph-properties fo:padding="0cm" fo:border="none" style:shadow="none" style:join-border="false"/>
    </style:style>
    <style:style style:name="P29" style:family="paragraph" style:parent-style-name="Standard">
      <style:text-properties officeooo:rsid="0020a2cc" officeooo:paragraph-rsid="0020a2cc"/>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fo:color="#366091" loext:opacity="100%" style:font-name="Cambria" fo:font-size="13pt" style:font-name-asian="Cambria2" style:font-size-asian="13pt" style:font-name-complex="Cambria2" style:font-size-complex="13pt"/>
    </style:style>
    <style:style style:name="T4" style:family="text">
      <style:text-properties fo:color="#366091" loext:opacity="100%" style:font-name="Cambria" fo:font-size="13pt" fo:font-weight="bold" style:font-name-asian="Cambria2" style:font-size-asian="13pt" style:font-weight-asian="bold" style:font-name-complex="Cambria2" style:font-size-complex="13pt"/>
    </style:style>
    <style:style style:name="T5" style:family="text">
      <style:text-properties style:font-weight-complex="bold"/>
    </style:style>
    <style:style style:name="T6" style:family="text">
      <style:text-properties officeooo:rsid="001d75a4"/>
    </style:style>
    <style:style style:name="T7" style:family="text">
      <style:text-properties fo:color="#000000" loext:opacity="100%" fo:font-size="12pt" style:font-size-asian="12pt" style:font-size-complex="12pt"/>
    </style:style>
    <style:style style:name="T8" style:family="text">
      <style:text-properties fo:color="#000000" loext:opacity="100%"/>
    </style:style>
    <style:style style:name="T9" style:family="text">
      <style:text-properties fo:color="#000000" loext:opacity="100%" style:font-name="Consolas" fo:font-size="9pt" style:font-name-asian="Consolas1" style:font-size-asian="9pt" style:font-name-complex="Consolas1" style:font-size-complex="9pt"/>
    </style:style>
    <style:style style:name="T10" style:family="text">
      <style:text-properties fo:color="#000000" loext:opacity="100%" fo:font-size="10pt" style:font-size-asian="10pt" style:font-size-complex="10pt"/>
    </style:style>
    <style:style style:name="T11" style:family="text">
      <style:text-properties officeooo:rsid="0028718c"/>
    </style:style>
    <style:style style:name="T12" style:family="text">
      <style:text-properties fo:color="#000000" loext:opacity="100%" fo:font-size="9pt" style:font-size-asian="9pt" style:font-size-complex="9pt"/>
    </style:style>
    <style:style style:name="T13" style:family="text">
      <style:text-properties fo:color="#000000" loext:opacity="100%"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officeooo:rsid="0020a2cc"/>
    </style:style>
    <style:style style:name="T16" style:family="text">
      <style:text-properties fo:color="#7f7f7f" loext:opacity="100%" fo:font-size="16pt" fo:font-style="italic" fo:font-weight="bold" style:font-size-asian="16pt" style:font-style-asian="italic" style:font-weight-asian="bold" style:font-size-complex="16pt" style:font-style-complex="italic">
        <loext:char-complex-color loext:theme-type="dark1" loext:color-type="theme">
          <loext:transformation loext:type="tint" loext:value="4980"/>
        </loext:char-complex-color>
      </style:text-propertie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heading=h.ry7ydux2mp0f"/>Proyecto 1 – 2026 – Gestión de riesgos, excepciones y ALU multiciclo en MIPS</text:h>
      <text:p text:style-name="P2">Serrano Fernández, Alberto</text:p>
      <text:p text:style-name="Standard"><text:date style:data-style-name="N10111" text:date-value="2026-04-08T07:02:30.892247376">miércoles, 8 de abril de 2026</text:date></text:p>
      <text:h text:style-name="Heading_20_2" text:outline-level="2" loext:marker-style-name="T1"><text:bookmark text:name="_heading=h.4r1q7i2otntp"/><text:span text:style-name="T1">Breve resumen</text:span><text:span text:style-name="T1"/></text:h>
      <text:p text:style-name="P3">En este proyecto se ha migrado un procesador MIPS uniciclo/segmentado base (con retardos y sin gestión de riesgos) a una arquitectura robusta con resolución de dependencias. Para ello, se ha diseñado la Unidad de Anticipación (UA) que soluciona riesgos de datos (RAW) mediante forwarding hacia la etapa EX, y la Unidad de Detención (UD) que inyecta burbujas (stalls) en IF/ID ante dependencias tipo load-use. Además, se han gestionado los riesgos de control invalidando instrucciones (flush) en saltos tomados. Se ha implementado un sistema completo de excepciones (IRQ, Data Abort, Undef), modificando el multiplexor del PC, añadiendo los registros status_reg y Exception_LR, e implementando el retorno con RTE. La ALU se ha modificado para incluir una FSM de 3 estados para instrucciones vectoriales MAC, gestionando el riesgo estructural con un stall_MIPS. Finalmente, se integraron contadores de rendimiento jerárquicos para monitorizar la eficiencia del código.</text:p>
      <text:p text:style-name="Standard"/>
      <text:h text:style-name="Heading_20_2" text:outline-level="2" loext:marker-style-name="T1"><text:span text:style-name="T1">Verificación de los requisitos funcionales:</text:span></text:h>
      <text:p text:style-name="Standard" loext:marker-style-name="T2"><text:span text:style-name="T3">RF1 JAL y RET</text:span><text:span text:style-name="T4"/></text:p>
      <text:p text:style-name="Standard"><text:span text:style-name="T2">Descripción: </text:span><text:span text:style-name="T5">Incluir las instrucciones JAL y RET ya trabajadas en prácticas en el MIPS del proyecto</text:span></text:p>
      <text:p text:style-name="Standard">¿<text:span text:style-name="T2">Cómo</text:span>? En la Unidad de Control (UC), para JAL (op=000101): RegWrite=1, dirección de escritura=31 (fijo), el dato a escribir es PC+4 y selecciona la dirección de salto al PC. Para RET (op=000110): lee R31 y pasa ese valor directo al Mux del PC. Como son saltos, la UD debe forzar valid_I_IF=0.</text:p>
      <text:p text:style-name="Standard"><text:span text:style-name="T2">Verificación: </text:span><text:span text:style-name="T5">Comprobar su correcto funcionamiento en un</text:span><text:span text:style-name="T2"> </text:span>banco de pruebas.</text:p>
      <text:p text:style-name="Standard"/>
      <text:p text:style-name="Standard" loext:marker-style-name="T2"><text:span text:style-name="T3">RF2 Anticipación de operandos</text:span><text:span text:style-name="T2"> </text:span></text:p>
      <text:p text:style-name="Standard"><text:soft-page-break/><text:span text:style-name="T2">Descripción:</text:span> El procesador es capaz de anticipar los operandos para las instrucciones LW, SW y ARIT a distancia 1 (siempre que el dato a anticipar no venga de un lw) y 2.</text:p>
      <text:p text:style-name="Standard">¿<text:span text:style-name="T2">Cómo</text:span>? La UA compara los registros destino de las etapas MEM WriteReg_MEM y WB WriteReg_WB con los registros fuente en EX Rs_EX y Rt_EX. Si coinciden y RegWrite está activo, se conmutan los multiplexores Mux_A_EX <text:span text:style-name="T6">y o</text:span> Mux_B_EX para tomar el dato adelantado. Prioridad siempre a MEM (distancia 1) sobre WB (distancia 2).</text:p>
      <text:p text:style-name="P4">Verificación:</text:p>
      <text:list text:style-name="WWNum1">
        <text:list-item>
          <text:p text:style-name="P5" loext:marker-style-name="T7"><text:span text:style-name="T8">En el banco de pruebas test_IRQ se realizan las siguientes anticipaciones:</text:span><text:span text:style-name="T7"/></text:p>
          <text:list>
            <text:list-item>
              <text:p text:style-name="P5" loext:marker-style-name="T7"><text:span text:style-name="T9">De LW <text:s/>R1, 8(R0) a ADD r31, R1, R31: anticipación de Rs distancia 2 </text:span><text:span text:style-name="T10">(tras detención de un ciclo del ADD)</text:span></text:p>
            </text:list-item>
            <text:list-item>
              <text:p text:style-name="P6" loext:marker-style-name="T7">De SUB r31, R31,R1 a LW R1, 0(R31): anticipación de Rs distancia 1.</text:p>
            </text:list-item>
            <text:list-item>
              <text:p text:style-name="P6" loext:marker-style-name="T7">De ADD R2, R1, R2 a SW R2, 7008(R6)</text:p>
            </text:list-item>
          </text:list>
        </text:list-item>
      </text:list>
      <text:p text:style-name="P7" loext:marker-style-name="T7"/>
      <text:p text:style-name="P7" loext:marker-style-name="T7"><draw:frame draw:style-name="fr1" draw:name="Imagen1" text:anchor-type="char" svg:width="15cm" svg:height="7.382cm" draw:z-index="0"><draw:image xlink:href="Pictures/100000010000077E000003B095C88046.png" xlink:type="simple" xlink:show="embed" xlink:actuate="onLoad" draw:mime-type="image/png"/></draw:frame></text:p>
      <text:list text:continue-numbering="true" text:style-name="WWNum1">
        <text:list-item>
          <text:p text:style-name="P8" loext:marker-style-name="T7">Caso 4 Forwarding de JAL a consumidor en EX (distancia 2 desde WB)</text:p>
          <text:p text:style-name="P9" loext:marker-style-name="T7">JAL func <text:s text:c="2"/></text:p>
          <text:p text:style-name="P9" loext:marker-style-name="T7">[burbuja flush] ; instrucción en IF se invalida</text:p>
          <text:p text:style-name="P8" loext:marker-style-name="T7">func: ADD R1, R31, R2 <text:s/></text:p>
          <text:p text:style-name="P8" loext:marker-style-name="T7"><text:span text:style-name="T11">E</text:span>l flush de IF por el salto crea una burbuja, así que el destino de JAL llega a EX exactamente cuando JAL está en WB. En WB, busW = PC4_WB. El camino WB→EX lleva busW, por tanto la anticipación funciona sin hardware extra. JAL_uso_rs = '0' es correcto.</text:p>
        </text:list-item>
      </text:list>
      <text:p text:style-name="P10" loext:marker-style-name="T7"/>
      <text:p text:style-name="P10" loext:marker-style-name="T7"/>
      <text:p text:style-name="P11" loext:marker-style-name="T7"><text:soft-page-break/>JAL escribe PC+4 en R31. El mux de escritura al BR selecciona PC4_WB cuando JAL_WB=1, por lo que busW = PC4_WB. El camino WB→EX del forwarding usa busW, así que la anticipación lleva el valor correcto.</text:p>
      <text:p text:style-name="P12">No puede haber un consumidor con JAL en MEM porque el flush de IF inserta una burbuja: la instrucción destino llega a EX justo cuando JAL está en WB. El forwarding WB→EX lo cubre. No hace falta hardware extra ni stall. JAL_uso_rs = '0' es correcto.</text:p>
      <text:p text:style-name="P10" loext:marker-style-name="T7"/>
      <text:list text:continue-numbering="true" text:style-name="WWNum1">
        <text:list-item>
          <text:p text:style-name="P8" loext:marker-style-name="T7">Caso 5 SW como consumidor de Rt (distancia 1)</text:p>
          <text:p text:style-name="P8" loext:marker-style-name="T7">ADD R3, R1, R2 <text:s/></text:p>
          <text:p text:style-name="P8" loext:marker-style-name="T7">SW <text:s/>R3, 0(R0) <text:s text:c="3"/></text:p>
          <text:p text:style-name="P8" loext:marker-style-name="T7">SW no escribe en BR pero sí lee Rt. La UA detecta Reg_Rt_EX = RW_MEM. La anticipación de Rt funciona para SW.</text:p>
        </text:list-item>
      </text:list>
      <text:p text:style-name="P10" loext:marker-style-name="T7"/>
      <text:p text:style-name="Standard" loext:marker-style-name="T3"><text:span text:style-name="T3">RF3 Riesgos de datos</text:span><text:span text:style-name="T3"/></text:p>
      <text:p text:style-name="Standard"><text:span text:style-name="T2">Descripción:</text:span> El procesador es capaz de detener la ejecución para evitar los riesgos causados por las dependencias en instrucciones lw-uso (distancia 1), beq o WRO (distancias 1 o 2).</text:p>
      <text:p text:style-name="Standard">¿<text:span text:style-name="T2">Cómo</text:span>? La UD detecta si la instrucción en EX es un load MemRead=1 y su destino coincide con los operandos fuente decodificados en ID. De ser así, levanta stall_ID=1. Esto congela el PC y el registro IF/ID, y pasa valid_I_ID=0 hacia EX. Para BEQ en ID, si depende de un cálculo en EX o MEM, también se para.</text:p>
      <text:p text:style-name="P4">Verificación:</text:p>
      <text:list text:style-name="WWNum2">
        <text:list-item>
          <text:p text:style-name="P13">En el banco de pruebas test_IRQ se realizan las siguientes detenciones:</text:p>
          <text:list>
            <text:list-item>
              <text:p text:style-name="P14"><text:span text:style-name="T8">Test 1: 1 ciclo de detención por</text:span><text:span text:style-name="T9"> </text:span><text:span text:style-name="T8">dependencia a distancia 2 entre </text:span><text:span text:style-name="T9">ADD R1, R1, R1 y beq R1, R1, main.</text:span></text:p>
            </text:list-item>
            <text:list-item>
              <text:p text:style-name="P15"><text:span text:style-name="T8">Test 2: <text:s/>1 ciclo de detención por dependencia lw-uso en varios casos. Por ejemplo: </text:span><text:span text:style-name="T12">de</text:span><text:span text:style-name="T9"> LW <text:s/>R1, 8(R0) a SW r1, 7004(r6)</text:span></text:p>
            </text:list-item>
            <text:list-item>
              <text:p text:style-name="P14"><text:span text:style-name="T8">Test 3: No se para por riesgo de datos entre las instrucciones </text:span><text:span text:style-name="T9">SW r1, 7004(r6) y ADD R1, R1, R1.</text:span></text:p>
              <text:p text:style-name="P16"><draw:frame draw:style-name="fr2" draw:name="Imagen2" text:anchor-type="char" svg:width="13.095cm" svg:height="6.428cm" draw:z-index="1"><draw:image xlink:href="Pictures/1000000100000781000003AF96067833.png" xlink:type="simple" xlink:show="embed" xlink:actuate="onLoad" draw:mime-type="image/png"/></draw:frame><text:soft-page-break/></text:p>
            </text:list-item>
          </text:list>
        </text:list-item>
        <text:list-item>
          <text:p text:style-name="P17">Caso 4 — BEQ dependiente de instrucción en EX (distancia 1)</text:p>
          <text:p text:style-name="P17">ADD R1, R1, R1</text:p>
          <text:p text:style-name="P17">BEQ R1, R1, main</text:p>
          <text:p text:style-name="P17">El test_IRQ ya lo hace. Escríbelo explícito: BEQ_rs='1' porque dep_rs_EX='1' → stall_ID=1.</text:p>
        </text:list-item>
        <text:list-item>
          <text:p text:style-name="P17">Caso 5 BEQ dependiente de instrucción en MEM (distancia 2)</text:p>
          <text:p text:style-name="P17">ADD R1, R1, R1</text:p>
          <text:p text:style-name="P17">NOP</text:p>
          <text:p text:style-name="P17">BEQ R1, R1, main</text:p>
        </text:list-item>
        <text:list-item>
          <text:p text:style-name="P17">Caso 6 RET dependiente de instrucción en EX</text:p>
          <text:p text:style-name="P17">LW R31, 0(R0<text:span text:style-name="T11">)</text:span></text:p>
          <text:p text:style-name="P17">RET</text:p>
        </text:list-item>
        <text:list-item>
          <text:p text:style-name="P17">Caso 7 SW NO genera stall</text:p>
          <text:p text:style-name="P17">ADD R1, R2, R3</text:p>
          <text:p text:style-name="P17">SW R1, 7004(R6)</text:p>
        </text:list-item>
      </text:list>
      <text:p text:style-name="Standard" loext:marker-style-name="T2"><text:span text:style-name="T3">RF4</text:span><text:span text:style-name="T2"> </text:span><text:span text:style-name="T3">Riesgos de control</text:span></text:p>
      <text:p text:style-name="Standard"><text:span text:style-name="T2">Descripción:</text:span> El procesador es capaz eliminar los riesgos de control causados por las instrucciones de salto: BEQ y RTE.</text:p>
      <text:p text:style-name="Standard">¿<text:span text:style-name="T2">Cómo</text:span>? Ante un salto incondicional JAL, RET, RTE)o un BEQ donde se cumple la condición resuelto en ID, la UD activa un borrado lógico (flush) forzando a '0' el bit de validez del registro IF/ID (valid_I_IF).</text:p>
      <text:p text:style-name="Standard" loext:marker-style-name="T2"><text:span text:style-name="T2">Verificación:</text:span><text:span text:style-name="T2"/></text:p>
      <text:list text:continue-numbering="true" text:style-name="WWNum2">
        <text:list-item>
          <text:p text:style-name="P13"><text:soft-page-break/>En el banco de pruebas test_IRQ se realizan varios saltos tomados en los que sólo se ejecutan las instrucciones adecuadas:</text:p>
          <text:list>
            <text:list-item>
              <text:p text:style-name="P16">beq R1, R1, main</text:p>
            </text:list-item>
            <text:list-item>
              <text:p text:style-name="P16"><draw:frame draw:style-name="fr3" draw:name="Imagen3" text:anchor-type="char" svg:x="0.875cm" svg:y="0.972cm" svg:width="14.365cm" svg:height="7.05cm" draw:z-index="2"><draw:image xlink:href="Pictures/1000000100000781000003AFE4E22836.png" xlink:type="simple" xlink:show="embed" xlink:actuate="onLoad" draw:mime-type="image/png"/></draw:frame>rte</text:p>
            </text:list-item>
          </text:list>
          <text:p text:style-name="P16"><text:s/></text:p>
          <text:p text:style-name="P16"><text:s/></text:p>
          <text:p text:style-name="P16"/>
        </text:list-item>
        <text:list-item>
          <text:p text:style-name="P16">Caso 3 JAL siempre hace flush de IF</text:p>
          <text:p text:style-name="P16">JAL func</text:p>
        </text:list-item>
        <text:list-item>
          <text:p text:style-name="P16">Caso 4 — RET siempre hace flush de IF</text:p>
          <text:p text:style-name="P16">RET <text:s text:c="10"/>; salto incondicional → Kill_IF=1 siempre</text:p>
          <text:p text:style-name="P16">JAL, RET y RTE activan salto_tomado incondicionalmente <text:span text:style-name="T11">por tanto</text:span> siempre flush.</text:p>
        </text:list-item>
      </text:list>
      <text:p text:style-name="P18"/>
      <text:p text:style-name="Standard" loext:marker-style-name="T3"><text:span text:style-name="T3">RF5 Riesgos estructurales</text:span><text:span text:style-name="T3"/></text:p>
      <text:p text:style-name="Standard" loext:marker-style-name="T8"><text:span text:style-name="T13">Descripción</text:span><text:span text:style-name="T8">: El procesador es capaz de detener la ejecución para evitar riesgos estructurales causados por las instrucciones MAC y MAC_ini.</text:span></text:p>
      <text:p text:style-name="Standard" loext:marker-style-name="T8"><text:span text:style-name="T13">¿Cómo?</text:span><text:span text:style-name="T8"> La UD vigila la señal MAC_busy de la ALU. Si está activa, levanta la señal general stall_MIPS. Esta señal paraliza todo el pipeline completo y bloquea la aceptación de interrupciones mientras la ALU multiciplo termina.</text:span></text:p>
      <text:p text:style-name="Standard" loext:marker-style-name="T8"><text:span text:style-name="T13">Verificación</text:span><text:span text:style-name="T8">:</text:span></text:p>
      <text:list text:continue-numbering="true" text:style-name="WWNum2">
        <text:list-item>
          <text:p text:style-name="P14" loext:marker-style-name="T8"><text:span text:style-name="T8">En el banco de pruebas testbench_2 se ejecutan varias instrucciones MAC y MAC_ini, incluyendo:</text:span><text:span text:style-name="T8"/></text:p>
          <text:list>
            <text:list-item>
              <text:p text:style-name="P14" loext:marker-style-name="T9"><text:span text:style-name="T9">mac_ini R10, R1, R5</text:span><text:span text:style-name="T9"/></text:p>
            </text:list-item>
            <text:list-item>
              <text:p text:style-name="P16" loext:marker-style-name="T9">mac R10, R2, R6</text:p>
              <text:p text:style-name="P16" loext:marker-style-name="T9"><draw:frame draw:style-name="fr2" draw:name="Imagen4" text:anchor-type="char" svg:width="13.095cm" svg:height="6.428cm" draw:z-index="3"><draw:image xlink:href="Pictures/1000000100000781000003AFADBB3C52.png" xlink:type="simple" xlink:show="embed" xlink:actuate="onLoad" draw:mime-type="image/png"/></draw:frame><text:soft-page-break/></text:p>
            </text:list-item>
          </text:list>
        </text:list-item>
      </text:list>
      <text:p text:style-name="P19" loext:marker-style-name="T3"/>
      <text:p text:style-name="Standard"><text:span text:style-name="T3">RF6</text:span> <text:span text:style-name="T3">Cambio a modo excepción</text:span></text:p>
      <text:p text:style-name="Standard"><text:span text:style-name="T2">Descripción:</text:span> Si el procesador está en modo usuario y recibe IRQ, ABORT o UNDEF pasa al modo correspondiente y ejecuta la rutina que indica la tabla de vectores de excepción. Si está en modo excepción ignora las señales hasta volver a modo usuario. </text:p>
      <text:p text:style-name="Standard">¿<text:span text:style-name="T2">Cómo</text:span>? Si status_reg="00" y llega una excepción válida, el hardware inyecta en el PC el vector <text:s/>0x4 IRQ, 0x8 Abort, 0xC Undef. Se fuerza un flush de IF, ID y EX (valid=0). El PC de la instrucción invalidada más antigua se almacena en Exception_LR. El registro de estado pasa a modo excepción status_reg="11".</text:p>
      <text:p text:style-name="Standard"><text:span text:style-name="T2">Verificación</text:span>:</text:p>
      <text:list text:style-name="WWNum4">
        <text:list-item>
          <text:p text:style-name="P20"><text:span text:style-name="T8">IRQ: banco de pruebas test_IRQ en el que se realizan diversas IRQs. Todas ellas se atienden s</text:span>i<text:span text:style-name="T8"> y sólo s</text:span>i<text:span text:style-name="T8"> el procesador está en modo usuario. Se ejecuta una RTI que contabiliza el número de IRQs. Se verifica su funcionamiento correcto.</text:span></text:p>
        </text:list-item>
        <text:list-item>
          <text:p text:style-name="P21">Data Abort: en la memoria de instrucciones se incluyen dos bancos de pruebas en el que se realizan un acceso no alineado, y un acceso a una dirección fuera de rango. En ambos casos la ejecución salta a la rutina Data Abort (bucle infinito).</text:p>
        </text:list-item>
        <text:list-item>
          <text:p text:style-name="P22"><text:span text:style-name="T8">Undef: en la memoria de instrucciones se </text:span>incluye<text:span text:style-name="T8"> un banco de pruebas en el que se ejecuta una instrucción con un código de instrucción desconocido. La ejecución salta a la rutina UNDEF (bucle infinito).</text:span></text:p>
        </text:list-item>
      </text:list>
      <text:p text:style-name="P19" loext:marker-style-name="T3"/>
      <text:p text:style-name="P19" loext:marker-style-name="T3">RF7 Retorno a modo usuario RTE</text:p>
      <text:p text:style-name="Standard"><text:span text:style-name="T2">Descripción:</text:span> Al terminar la excepción se vuelve a la ejecución original con la instrucción RTE</text:p>
      <text:p text:style-name="Standard"><text:soft-page-break/>¿<text:span text:style-name="T2">Cómo</text:span>? En ID, RTE conmuta el multiplexor del PC para que la próxima instrucción se traiga desde Exception_LR. Modifica el status_reg forzándolo a "00" rehabilitando IRQs. Realiza un flush de la instrucción que venía detrás de ella en IF.</text:p>
      <text:p text:style-name="Standard"><text:span text:style-name="T2">Verificación: </text:span>Sólo tenéis que verificarlo para las IRQs.<text:span text:style-name="T2"> </text:span><text:span text:style-name="T5">El código debe funcionar aunque se interrumpa repetidas veces.</text:span><text:span text:style-name="T2"> </text:span>Para el resto de excepciones se asume que es un fallo irresoluble y se debe resetear el sistema, pero la gestión es idéntica que para las IRQs. En el banco de pruebas test_IRQ se puede comprobar que se retorna a la ejecución sin alterarla siempre que se siga un esquema de prólogo y epílogo apropiado (guardando y restaurando los registros en pila). Para ello se utiliza el registro 31 como SP. </text:p>
      <text:p text:style-name="Standard"><draw:frame draw:style-name="fr2" draw:name="Imagen5" text:anchor-type="char" svg:width="15cm" svg:height="7.362cm" draw:z-index="4"><draw:image xlink:href="Pictures/1000000100000781000003AF6DA2C9F4.png" xlink:type="simple" xlink:show="embed" xlink:actuate="onLoad" draw:mime-type="image/png"/></draw:frame></text:p>
      <text:p text:style-name="Standard" loext:marker-style-name="T3"><text:span text:style-name="T3">RF8 ALU multiciclo</text:span></text:p>
      <text:p text:style-name="Standard"><text:span text:style-name="T14">Descripción:</text:span> El procesador es capaz de ejecutar las instrucciones MAC y MAC_ini en 3 ciclos y gestionar el estado del registro ACC ante el tratamiento de excepciones.</text:p>
      <text:p text:style-name="Standard"><text:span text:style-name="T14">¿Cómo?</text:span> FSM de 3 estados: S_IDLE (registra productos, ready=0), S_MULT (registra suma en árbol, ready=0), y S_ADD (acumula en ACC, ready=1 liberando el stall de la UD). La gestión del ACC en excepciones es por software: la rutina de interrupción debe guardarlo en pila al entrar y restaurarlo antes del RTE.</text:p>
      <text:p text:style-name="Standard"><text:span text:style-name="T14">Verificación</text:span>:</text:p>
      <text:p text:style-name="Standard"><text:tab/></text:p>
      <text:list text:style-name="WWNum7">
        <text:list-item>
          <text:p text:style-name="P23">Diseñado testbench_6 (en fichero RAM_I_test_exceptions_neuron_2026.vhd)</text:p>
          <text:p text:style-name="P23"/>
        </text:list-item>
        <text:list-item>
          <text:p text:style-name="P24"><draw:frame draw:style-name="fr4" draw:name="Imagen7" text:anchor-type="char" svg:width="14.365cm" svg:height="7.098cm" draw:z-index="6"><draw:image xlink:href="Pictures/10000001000007520000039EFA1E2F21.png" xlink:type="simple" xlink:show="embed" xlink:actuate="onLoad" draw:mime-type="image/png"/></draw:frame><text:soft-page-break/>se observa la ejecución de una instrucción vectorial donde la máquina de estados de la ALU completa exitosamente sus tres ciclos lógicos</text:p>
        </text:list-item>
      </text:list>
      <text:p text:style-name="Standard" loext:marker-style-name="T2"><text:span text:style-name="T3">RF9 Contadores</text:span><text:span text:style-name="T2"> </text:span></text:p>
      <text:p text:style-name="Standard"><text:span text:style-name="T2">Descripción: </text:span>los contadores nos dan información de la ejecución del código</text:p>
      <text:p text:style-name="Standard">¿<text:span text:style-name="T2">Cómo</text:span>? Se utiliza lógica combinacional directa sobre las señales de la UD y del pipeline:</text:p>
      <text:p text:style-name="Standard">Instrucciones dinámicas: Se incrementa directamente con valid_I_WB.</text:p>
      <text:p text:style-name="Standard">Riesgos de control: Incrementan cuando se anula la instrucción en IF (kill_IF).</text:p>
      <text:p text:style-name="Standard">Riesgos de datos: Incrementan con stall_ID, pero se condicionan con not(stall_MIPS) para darle menor jerarquía y no sumar si el procesador está bloqueado por memoria o ALU.</text:p>
      <text:p text:style-name="P25">Ri<text:span text:style-name="T15">e</text:span>sgos estructurales: Se desglosan evaluando stall_MIPS.</text:p>
      <text:p text:style-name="P25">Excepciones: Se cuenta directamente el pulso de Exception_accepted.</text:p>
      <text:p text:style-name="Standard"><text:span text:style-name="T2">Verificación: </text:span>En el banco de pruebas test_IRQ se ha comprobado que:</text:p>
      <text:list text:style-name="WWNum3">
        <text:list-item>
          <text:p text:style-name="P26">Por cada instrucción válida que hace su etapa WB se incrementa el contador de instrucciones Ins. Si la instrucción no es válida no se incrementa.</text:p>
        </text:list-item>
        <text:list-item>
          <text:p text:style-name="P26">Data_stalls contabilizan bien los ciclos debidos a los riesgos de datos incrementando el número indicado en los test mencionados en el RF5.</text:p>
        </text:list-item>
        <text:list-item>
          <text:p text:style-name="P26">Control_stalls contabilizan bien los ciclos debidos a los riesgos de control, incrementando un ciclo en cada salto tomado (ver pruebas en el RF6).</text:p>
        </text:list-item>
        <text:list-item>
          <text:p text:style-name="P26">Exception_accepted contabiliza las excepciones aceptadas. Su cuenta coincide con la cuenta que realiza el propio código.</text:p>
        </text:list-item>
        <text:list-item>
          <text:p text:style-name="P26"><text:soft-page-break/>Memory_stalls: cada vez que se pide una operación a memoria, y esta no esta “ready” se incrementa este contador.</text:p>
        </text:list-item>
        <text:list-item>
          <text:p text:style-name="P26">IMPORTANTE: las paradas deben incrementar sólo un contador. Si hay hay varios motivos, se cuenta el de mayor jerarquía : memory stall&gt; data_stall&gt; control_stall. Ya que el otro se mantendrá y se contabilizará cuando toque.<text:bookmark text:name="_heading=h.prbjf4vj9i80"/><text:bookmark text:name="_heading=h.gjdgxs"/></text:p>
        </text:list-item>
      </text:list>
      <text:p text:style-name="P27"><draw:frame draw:style-name="fr2" draw:name="Imagen6" text:anchor-type="char" svg:width="13.73cm" svg:height="6.74cm" draw:z-index="5"><draw:image xlink:href="Pictures/1000000100000781000003AF299691BA.png" xlink:type="simple" xlink:show="embed" xlink:actuate="onLoad" draw:mime-type="image/png"/></draw:frame></text:p>
      <text:h text:style-name="Heading_20_2" text:outline-level="2" loext:marker-style-name="T1"><text:bookmark text:name="_heading=h.e4t0we9bu5uk"/><text:span text:style-name="T1">Cuantificación de horas dedicadas</text:span></text:h>
      <text:list text:style-name="WWNum5">
        <text:list-item>
          <text:p text:style-name="P28">Estudio del MIPS, VHDL, entorno, instalación…: <text:span text:style-name="T15">3h</text:span></text:p>
        </text:list-item>
        <text:list-item>
          <text:p text:style-name="P28">Adición de las nuevas instrucciones: <text:span text:style-name="T15">2h</text:span></text:p>
        </text:list-item>
        <text:list-item>
          <text:p text:style-name="P28">Gestión de excepciones: <text:span text:style-name="T15">4h</text:span></text:p>
        </text:list-item>
        <text:list-item>
          <text:p text:style-name="P28">Gestión de riesgos: <text:span text:style-name="T15">6h</text:span></text:p>
        </text:list-item>
        <text:list-item>
          <text:p text:style-name="P28">Depuración, verificación y programas de prueba: <text:span text:style-name="T15">8h</text:span></text:p>
        </text:list-item>
        <text:list-item>
          <text:p text:style-name="P28">Memoria: <text:span text:style-name="T15">2h</text:span></text:p>
        </text:list-item>
      </text:list>
      <text:p text:style-name="P18"><text:bookmark text:name="_heading=h.jo5hni6jgu5z"/></text:p>
      <text:h text:style-name="Heading_20_2" text:outline-level="2" loext:marker-style-name="T1"><text:bookmark text:name="_heading=h.idmk9u74mc72"/><text:span text:style-name="T1">Conclusiones y Autoevaluación</text:span></text:h>
      <text:p text:style-name="P29">El trabajo ha servido para entender en la práctica cómo las dependencias teóricas del código afectan al hardware real. Pasar de un procesador retardado ideal a uno realista con resolución activa de riesgos UD/UA y soporte multiciclo. El proyecto ha sido exigente en depuración pero muy instructivo a nivel de herramientas (GTKWave/GHDL). </text:p>
      <text:h text:style-name="Heading_20_2" text:outline-level="2" loext:marker-style-name="T1"><text:span text:style-name="T1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ymbols"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s" fo:country="ES" style:letter-kerning="false" style:font-name-asian="Calibri2" style:font-size-asian="11pt" style:language-asian="es" style:country-asian="E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1pt" fo:language="es" fo:country="ES" style:letter-kerning="false" style:font-name-asian="Calibri2" style:font-size-asian="11pt" style:language-asian="es" style:country-asian="E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365f91" loext:opacity="100%" style:font-name="Cambria1" fo:font-family="Cambria" style:font-family-generic="swiss" style:font-pitch="variable" fo:font-size="13pt" style:font-name-asian="Calibri2" style:font-family-asian="Calibri" style:font-family-generic-asian="system" style:font-pitch-asian="variable" style:font-size-asian="13pt" style:font-name-complex="Calibri2" style:font-family-complex="Calib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style:default-outline-level="3" style:list-style-name="" style:class="chapter">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chapter">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1.27cm" fo:margin-top="0cm" fo:margin-bottom="0.353cm" style:contextual-spacing="true"/>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365f91" loext:opacity="100%" style:font-name="Cambria1" fo:font-family="Cambria" style:font-family-generic="swiss" style:font-pitch="variable" fo:font-size="13pt" style:font-name-asian="Calibri2" style:font-family-asian="Calibri" style:font-family-generic-asian="system" style:font-pitch-asian="variable" style:font-size-asian="13pt" style:font-name-complex="Calibri2" style:font-family-complex="Calib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84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24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94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34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504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44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s" number:country="E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ing_20_3">
      <style:paragraph-properties fo:text-align="end" style:justify-single-word="false"/>
    </style:style>
    <style:style style:name="MT1" style:family="text">
      <style:text-properties fo:font-style="italic" fo:font-weight="normal" style:font-style-asian="italic" style:font-weight-asian="normal"/>
    </style:style>
    <style:page-layout style:name="Mpm1">
      <style:page-layout-properties fo:page-width="21.001cm" fo:page-height="29.7cm" style:num-format="1" style:print-orientation="portrait" fo:margin-top="1.244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4cm" fo:margin-left="0cm" fo:margin-right="0cm" fo:margin-bottom="1.15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3" loext:marker-style-name="MT1"><text:bookmark text:name="_heading=h.yyiacl2xm6sm"/><text:span text:style-name="MT1">AOC2 - EINA - Universidad de Zaragoza</text:span><text:span text:style-name="MT1"/></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avi</meta:initial-creator>
    <meta:editing-cycles>12</meta:editing-cycles>
    <meta:creation-date>2024-03-06T12:21:00</meta:creation-date>
    <dc:date>2026-04-08T07:02:30.856584301</dc:date>
    <meta:editing-duration>PT1H13M13S</meta:editing-duration>
    <meta:generator>LibreOffice/25.2.3.2$Linux_X86_64 LibreOffice_project/520$Build-2</meta:generator>
    <meta:print-date>2026-04-07T04:58:24.805014475</meta:print-date>
    <meta:printed-by>Archivos PDF</meta:printed-by>
    <meta:document-statistic meta:table-count="0" meta:image-count="7" meta:object-count="0" meta:page-count="9" meta:paragraph-count="119" meta:word-count="1913" meta:character-count="11141" meta:non-whitespace-character-count="9367"/>
    <meta:user-defined meta:name="AppVersion">16.0000</meta:user-defined>
    <meta:user-defined meta:name="Company">Universidad de Zaragoza</meta:user-defined>
    <meta:template xlink:type="simple" xlink:actuate="onRequest" xlink:title="Normal.dotm" xlink:href=""/>
  </office:meta>
</office:document-meta>
</file>